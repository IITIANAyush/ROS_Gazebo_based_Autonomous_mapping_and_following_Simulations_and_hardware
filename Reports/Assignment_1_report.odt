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B0000031EB11D5B644CBEF9CC.png" manifest:media-type="image/png"/>
  <manifest:file-entry manifest:full-path="Pictures/100000010000032B000002C4AC217B6C73E732BA.png" manifest:media-type="image/png"/>
  <manifest:file-entry manifest:full-path="Pictures/100000010000078000000438BB96212DB8355152.png" manifest:media-type="image/png"/>
  <manifest:file-entry manifest:full-path="Pictures/10000001000001B10000019823848D4573A8E221.png" manifest:media-type="image/png"/>
  <manifest:file-entry manifest:full-path="Pictures/10000001000002800000028CC148992701C937C8.png" manifest:media-type="image/png"/>
  <manifest:file-entry manifest:full-path="Pictures/100000000000004C0000004E081FDF2EC300E0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35in" table:align="left"/>
    </style:style>
    <style:style style:name="Table1.A" style:family="table-column">
      <style:table-column-properties style:column-width="1.0653in"/>
    </style:style>
    <style:style style:name="Table1.B" style:family="table-column">
      <style:table-column-properties style:column-width="2.2847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4">
      <style:text-properties officeooo:paragraph-rsid="000ca2f5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1">
      <style:text-properties officeooo:paragraph-rsid="00125d73"/>
    </style:style>
    <style:style style:name="P34" style:family="paragraph" style:parent-style-name="Text_20_body" style:list-style-name="L2">
      <style:text-properties officeooo:rsid="000ca2f5" officeooo:paragraph-rsid="000ca2f5"/>
    </style:style>
    <style:style style:name="P35" style:family="paragraph" style:parent-style-name="Text_20_body">
      <style:text-properties officeooo:paragraph-rsid="000ca2f5"/>
    </style:style>
    <style:style style:name="P36" style:family="paragraph" style:parent-style-name="Text_20_body">
      <style:text-properties officeooo:rsid="000ed209" officeooo:paragraph-rsid="000ed209"/>
    </style:style>
    <style:style style:name="P37" style:family="paragraph" style:parent-style-name="Text_20_body" style:list-style-name="L26">
      <style:text-properties officeooo:rsid="00125d73" officeooo:paragraph-rsid="00125d73"/>
    </style:style>
    <style:style style:name="P38" style:family="paragraph" style:parent-style-name="Text_20_body">
      <style:text-properties officeooo:rsid="00125d73" officeooo:paragraph-rsid="00125d73"/>
    </style:style>
    <style:style style:name="T1" style:family="text">
      <style:text-properties officeooo:rsid="000ca2f5"/>
    </style:style>
    <style:style style:name="T2" style:family="text">
      <style:text-properties fo:font-size="7pt" officeooo:rsid="000ca2f5" style:font-size-asian="7pt" style:font-size-complex="7pt"/>
    </style:style>
    <style:style style:name="T3" style:family="text">
      <style:text-properties fo:font-size="6pt" officeooo:rsid="000ca2f5" style:font-size-asian="5.25pt" style:font-size-complex="6pt"/>
    </style:style>
    <style:style style:name="T4" style:family="text">
      <style:text-properties fo:font-size="6pt" officeooo:rsid="000d8cdd" style:font-size-asian="5.25pt" style:font-size-complex="6pt"/>
    </style:style>
    <style:style style:name="T5" style:family="text">
      <style:text-properties fo:font-size="6pt" officeooo:rsid="000d8cdd" style:font-size-asian="6pt" style:font-size-complex="6pt"/>
    </style:style>
    <style:style style:name="T6" style:family="text">
      <style:text-properties officeooo:rsid="000ed209"/>
    </style:style>
    <style:style style:name="T7" style:family="text">
      <style:text-properties officeooo:rsid="00109ad3"/>
    </style:style>
    <style:style style:name="T8" style:family="text">
      <style:text-properties officeooo:rsid="00125d73"/>
    </style:style>
    <style:style style:name="T9" style:family="text">
      <style:text-properties fo:font-size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125d73" style:font-size-asian="12pt" style:font-size-complex="12pt"/>
    </style:style>
    <style:style style:name="T12" style:family="text">
      <style:text-properties fo:font-size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402in, 4in, 0.5598in, 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5201in, 0in, 0in, 4.22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701in, 0in, 0.3701in, 2.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Autonomous Navigation of TurtleBot3 using Custom Planning and Control (ROS2 + Gazebo + Real Robot)</text:span></text:h>
      <text:p text:style-name="Horizontal_20_Line"/>
      <text:h text:style-name="Heading_20_2" text:outline-level="2"><text:span text:style-name="Strong_20_Emphasis">1. Introduction</text:span></text:h>
      <text:p text:style-name="Text_20_body">Autonomous navigation is a fundamental problem in robotics involving perception, mapping, planning, and control. This project presents the design and implementation of a complete navigation pipeline using ROS2, developed and tested in simulation (Gazebo) and deployed on a real TurtleBot3 platform.</text:p>
      <text:p text:style-name="Text_20_body">The system integrates:</text:p>
      <text:list xml:id="list243791969" text:style-name="L1">
        <text:list-item>
          <text:p text:style-name="P2">SLAM-based mapping</text:p>
        </text:list-item>
        <text:list-item>
          <text:p text:style-name="P2">Custom path planning (A* and GVD-based)</text:p>
        </text:list-item>
        <text:list-item>
          <text:p text:style-name="P2">Path tracking with control and obstacle avoidance</text:p>
        </text:list-item>
        <text:list-item>
          <text:p text:style-name="P2">Localization using AMCL</text:p>
        </text:list-item>
      </text:list>
      <text:p text:style-name="Text_20_body">The goal of this project is to build a <text:span text:style-name="Strong_20_Emphasis">modular, extensible navigation framework</text:span> and analyze the performance of different planning and control strategies.</text:p>
      <text:p text:style-name="Horizontal_20_Line"/>
      <text:h text:style-name="Heading_20_2" text:outline-level="2"><text:span text:style-name="Strong_20_Emphasis">2. System Overview</text:span></text:h>
      <text:p text:style-name="Text_20_body">The navigation pipeline follows a structured flow:</text:p>
      <text:p text:style-name="Text_20_body"><text:span text:style-name="Strong_20_Emphasis">SLAM → Map → Planner → Path → Controller → Robot Motion</text:span></text:p>
      <text:h text:style-name="Heading_20_3" text:outline-level="3"><text:span text:style-name="Strong_20_Emphasis">Key Components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Module</text:p>
            </table:table-cell>
            <table:table-cell table:style-name="Table1.A1" office:value-type="string">
              <text:p text:style-name="Table_20_Heading">Function</text:p>
            </table:table-cell>
          </table:table-row>
        </table:table-header-rows>
        <table:table-row>
          <table:table-cell table:style-name="Table1.A1" office:value-type="string">
            <text:p text:style-name="Table_20_Contents">SLAM</text:p>
          </table:table-cell>
          <table:table-cell table:style-name="Table1.A1" office:value-type="string">
            <text:p text:style-name="Table_20_Contents">Generates occupancy grid map</text:p>
          </table:table-cell>
        </table:table-row>
        <table:table-row>
          <table:table-cell table:style-name="Table1.A1" office:value-type="string">
            <text:p text:style-name="Table_20_Contents">Map Server</text:p>
          </table:table-cell>
          <table:table-cell table:style-name="Table1.A1" office:value-type="string">
            <text:p text:style-name="Table_20_Contents">Stores and serves map</text:p>
          </table:table-cell>
        </table:table-row>
        <table:table-row>
          <table:table-cell table:style-name="Table1.A1" office:value-type="string">
            <text:p text:style-name="Table_20_Contents">Planner Server</text:p>
          </table:table-cell>
          <table:table-cell table:style-name="Table1.A1" office:value-type="string">
            <text:p text:style-name="Table_20_Contents">Computes path (A*, GVD)</text:p>
          </table:table-cell>
        </table:table-row>
        <table:table-row>
          <table:table-cell table:style-name="Table1.A1" office:value-type="string">
            <text:p text:style-name="Table_20_Contents">Path Follower</text:p>
          </table:table-cell>
          <table:table-cell table:style-name="Table1.A1" office:value-type="string">
            <text:p text:style-name="Table_20_Contents">Tracks path and avoids obstacles</text:p>
          </table:table-cell>
        </table:table-row>
        <table:table-row>
          <table:table-cell table:style-name="Table1.A1" office:value-type="string">
            <text:p text:style-name="Table_20_Contents">AMCL</text:p>
          </table:table-cell>
          <table:table-cell table:style-name="Table1.A1" office:value-type="string">
            <text:p text:style-name="Table_20_Contents">Localization (real robot)</text:p>
          </table:table-cell>
        </table:table-row>
        <table:table-row>
          <table:table-cell table:style-name="Table1.A1" office:value-type="string">
            <text:p text:style-name="Table_20_Contents">RViz</text:p>
          </table:table-cell>
          <table:table-cell table:style-name="Table1.A1" office:value-type="string">
            <text:p text:style-name="Table_20_Contents">Visualization</text:p>
          </table:table-cell>
        </table:table-row>
      </table:table>
      <text:p text:style-name="Horizontal_20_Line"/>
      <text:h text:style-name="Heading_20_2" text:outline-level="2"><text:soft-page-break/><text:span text:style-name="Strong_20_Emphasis">3. Mapping (Week 1)</text:span></text:h>
      <text:h text:style-name="Heading_20_3" text:outline-level="3"><text:span text:style-name="Strong_20_Emphasis">Objective</text:span></text:h>
      <text:p text:style-name="Text_20_body">To generate a 2D occupancy grid map using LiDAR data.<draw:frame draw:style-name="fr4" draw:name="Image1" text:anchor-type="char" svg:x="5.1201in" svg:y="-0.0535in" svg:width="1.9953in" svg:height="2.048in" draw:z-index="0"><draw:image xlink:href="Pictures/100000000000004C0000004E081FDF2EC300E06D.png" xlink:type="simple" xlink:show="embed" xlink:actuate="onLoad" draw:mime-type="image/png"/></draw:frame></text:p>
      <text:h text:style-name="Heading_20_3" text:outline-level="3"><text:span text:style-name="Strong_20_Emphasis">Methodology</text:span></text:h>
      <text:list xml:id="list2245902629" text:style-name="L2">
        <text:list-item>
          <text:p text:style-name="P3">The TurtleBot3 was manually controlled using keyboard teleoperation <text:span text:style-name="T1">and the recorded data was stored as a occupancy grisd as shown in fig 3.1</text:span></text:p>
        </text:list-item>
        <text:list-item>
          <text:p text:style-name="P34">A python script was used to generate a configuration space over the occupancy grid as sgown in fig 3.2</text:p>
        </text:list-item>
        <text:list-item>
          <text:p text:style-name="P3">SLAM Toolbox was used in asynchronous mode to build the map in real time. <text:s text:c="8"/><text:span text:style-name="T2">Fig 3.1</text:span></text:p>
        </text:list-item>
        <text:list-item>
          <text:p text:style-name="P3">RViz was used to visualize:</text:p>
          <text:list>
            <text:list-item>
              <text:p text:style-name="P3">Laser scans<draw:frame draw:style-name="fr4" draw:name="Image2" text:anchor-type="char" svg:x="5.1382in" svg:y="-0.1201in" svg:width="1.9772in" svg:height="2.0134in" draw:z-index="1"><draw:image xlink:href="Pictures/10000001000002800000028CC148992701C937C8.png" xlink:type="simple" xlink:show="embed" xlink:actuate="onLoad" draw:mime-type="image/png"/></draw:frame></text:p>
            </text:list-item>
            <text:list-item>
              <text:p text:style-name="P3">Occupancy grid</text:p>
            </text:list-item>
            <text:list-item>
              <text:p text:style-name="P3">Robot pose</text:p>
            </text:list-item>
          </text:list>
        </text:list-item>
      </text:list>
      <text:h text:style-name="Heading_20_3" text:outline-level="3"><text:span text:style-name="Strong_20_Emphasis">Outcome</text:span></text:h>
      <text:p text:style-name="Text_20_body">A map was successfully generated and saved as:</text:p>
      <text:list xml:id="list898874186" text:style-name="L3">
        <text:list-item>
          <text:p text:style-name="P4"><text:span text:style-name="Source_20_Text">.pgm</text:span> (image representation)</text:p>
        </text:list-item>
        <text:list-item>
          <text:p text:style-name="P4"><text:span text:style-name="Source_20_Text">.yaml</text:span> (metadata and resolution)<text:tab/><text:tab/><text:tab/><text:tab/><text:tab/><text:tab/><text:tab/><text:span text:style-name="T3">Fig3.2</text:span></text:p>
        </text:list-item>
      </text:list>
      <text:p text:style-name="Horizontal_20_Line"/>
      <text:h text:style-name="Heading_20_2" text:outline-level="2"><text:span text:style-name="Strong_20_Emphasis">4. Path Planning (Week 2)</text:span></text:h>
      <text:h text:style-name="Heading_20_3" text:outline-level="3"><text:span text:style-name="Strong_20_Emphasis">Objective</text:span></text:h>
      <text:p text:style-name="Text_20_body">To design and implement custom path planning algorithms.</text:p>
      <text:p text:style-name="Horizontal_20_Line"/>
      <text:h text:style-name="Heading_20_3" text:outline-level="3"><text:span text:style-name="Emphasis">4.1 A Planner</text:span>*<draw:frame draw:style-name="fr4" draw:name="Image3" text:anchor-type="char" svg:x="4.4102in" svg:y="0.0472in" svg:width="2.161in" svg:height="2.0366in" draw:z-index="2"><draw:image xlink:href="Pictures/10000001000001B10000019823848D4573A8E221.png" xlink:type="simple" xlink:show="embed" xlink:actuate="onLoad" draw:mime-type="image/png"/></draw:frame></text:h>
      <text:p text:style-name="Text_20_body">A grid-based A* algorithm was implemented with:</text:p>
      <text:list xml:id="list117651309" text:style-name="L4">
        <text:list-item>
          <text:p text:style-name="P5">8-connected motion model</text:p>
        </text:list-item>
        <text:list-item>
          <text:p text:style-name="P5">Euclidean / <text:span text:style-name="T1">manhattan </text:span><text:s/><text:span text:style-name="T1">distance <text:line-break/>based Cost function defination</text:span></text:p>
        </text:list-item>
      </text:list>
      <text:h text:style-name="Heading_20_4" text:outline-level="4"><text:span text:style-name="Strong_20_Emphasis">Characteristics</text:span></text:h>
      <text:list xml:id="list1867681916" text:style-name="L5">
        <text:list-item>
          <text:p text:style-name="P6">Finds shortest path</text:p>
        </text:list-item>
        <text:list-item>
          <text:p text:style-name="P6">Efficient computation<text:tab/><text:tab/><text:tab/><text:tab/><text:tab/><text:tab/><text:tab/><text:span text:style-name="T5">Fig: 4.1 Path A* : Green , Path GVD: Red</text:span></text:p>
        </text:list-item>
        <text:list-item>
          <text:p text:style-name="P6"><text:soft-page-break/>May pass close to obstacles</text:p>
        </text:list-item>
      </text:list>
      <text:p text:style-name="Horizontal_20_Line"/>
      <text:h text:style-name="Heading_20_3" text:outline-level="3"><text:span text:style-name="Strong_20_Emphasis">4.2 GVD-Based Planning</text:span></text:h>
      <text:p text:style-name="P35">To improve safety, a <text:span text:style-name="Strong_20_Emphasis">clearance-aware planner</text:span> was implemented using:</text:p>
      <text:h text:style-name="P1" text:outline-level="4"><text:span text:style-name="Strong_20_Emphasis">Brushfire Algorithm</text:span></text:h>
      <text:list xml:id="list718343849" text:style-name="L6">
        <text:list-item>
          <text:p text:style-name="P7">Computes distance of each cell from nearest obstacle</text:p>
        </text:list-item>
        <text:list-item>
          <text:p text:style-name="P7">Produces a clearance map</text:p>
        </text:list-item>
      </text:list>
      <text:h text:style-name="Heading_20_4" text:outline-level="4"><text:span text:style-name="Strong_20_Emphasis">Modified A</text:span>*</text:h>
      <text:list xml:id="list501832206" text:style-name="L7">
        <text:list-item>
          <text:p text:style-name="P8">Adds penalty for low-clearance regions</text:p>
        </text:list-item>
        <text:list-item>
          <text:p text:style-name="P8">Encourages paths away from obstacles</text:p>
        </text:list-item>
      </text:list>
      <text:h text:style-name="Heading_20_4" text:outline-level="4"><text:span text:style-name="Strong_20_Emphasis">Characteristics</text:span></text:h>
      <text:list xml:id="list1801513633" text:style-name="L8">
        <text:list-item>
          <text:p text:style-name="P9">Safer paths</text:p>
        </text:list-item>
        <text:list-item>
          <text:p text:style-name="P9">Slightly longer paths</text:p>
        </text:list-item>
        <text:list-item>
          <text:p text:style-name="P9">More robust in cluttered environments</text:p>
        </text:list-item>
      </text:list>
      <text:p text:style-name="Horizontal_20_Line"/>
      <text:h text:style-name="Heading_20_3" text:outline-level="3"><text:span text:style-name="Strong_20_Emphasis">4.3 Planner Server Architecture</text:span></text:h>
      <text:p text:style-name="Text_20_body">The planner:</text:p>
      <text:list xml:id="list3970503788" text:style-name="L9">
        <text:list-item>
          <text:p text:style-name="P10">Subscribes to <text:span text:style-name="Source_20_Text">/map</text:span></text:p>
        </text:list-item>
        <text:list-item>
          <text:p text:style-name="P10">Converts world → grid coordinates</text:p>
        </text:list-item>
        <text:list-item>
          <text:p text:style-name="P10">Computes path once</text:p>
        </text:list-item>
        <text:list-item>
          <text:p text:style-name="P10">Publishes:</text:p>
          <text:list>
            <text:list-item>
              <text:p text:style-name="P10"><text:span text:style-name="Source_20_Text">/planned_path_astar</text:span></text:p>
            </text:list-item>
            <text:list-item>
              <text:p text:style-name="P10"><text:span text:style-name="Source_20_Text">/planned_path_gvd</text:span></text:p>
            </text:list-item>
          </text:list>
        </text:list-item>
      </text:list>
      <text:p text:style-name="Text_20_body">It also republishes paths periodically to support late subscribers.</text:p>
      <text:p text:style-name="Horizontal_20_Line"/>
      <text:h text:style-name="Heading_20_2" text:outline-level="2"><text:span text:style-name="Strong_20_Emphasis">5. Path Following (Control)</text:span></text:h>
      <text:h text:style-name="Heading_20_3" text:outline-level="3"><text:span text:style-name="Emphasis">5.1 A-Based Path Follower</text:span>*</text:h>
      <text:p text:style-name="Text_20_body">A hybrid control strategy was implemented combining:</text:p>
      <text:h text:style-name="Heading_20_4" text:outline-level="4"><text:span text:style-name="Strong_20_Emphasis">(a) Lookahead-Based Tracking</text:span></text:h>
      <text:list xml:id="list4069179299" text:style-name="L10">
        <text:list-item>
          <text:p text:style-name="P11">Selects a target point ahead of current position</text:p>
        </text:list-item>
        <text:list-item>
          <text:p text:style-name="P11"><text:soft-page-break/>Prevents oscillations and improves smoothness</text:p>
        </text:list-item>
      </text:list>
      <text:h text:style-name="Heading_20_4" text:outline-level="4"><text:span text:style-name="Strong_20_Emphasis">(b) PID Control</text:span></text:h>
      <text:p text:style-name="Text_20_body">Controls angular velocity based on heading error:</text:p>
      <text:list xml:id="list568076095" text:style-name="L11">
        <text:list-item>
          <text:p text:style-name="P12">Proportional: corrects deviation</text:p>
        </text:list-item>
        <text:list-item>
          <text:p text:style-name="P12">Integral: compensates bias</text:p>
        </text:list-item>
        <text:list-item>
          <text:p text:style-name="P12">Derivative: adds damping</text:p>
        </text:list-item>
      </text:list>
      <text:h text:style-name="Heading_20_4" text:outline-level="4"><text:span text:style-name="Strong_20_Emphasis">(c) Obstacle Avoidance (Reactive)</text:span></text:h>
      <text:p text:style-name="Text_20_body">A 3-zone safety model using LiDAR:</text:p>
      <text:list xml:id="list3530172522" text:style-name="L12">
        <text:list-item>
          <text:p text:style-name="P13"><text:span text:style-name="Strong_20_Emphasis">STOP zone</text:span> → immediate halt</text:p>
        </text:list-item>
        <text:list-item>
          <text:p text:style-name="P13"><text:span text:style-name="Strong_20_Emphasis">SLOW zone</text:span> → reduced speed</text:p>
        </text:list-item>
        <text:list-item>
          <text:p text:style-name="P13"><text:span text:style-name="Strong_20_Emphasis">WARN zone</text:span> → gradual slowdown</text:p>
        </text:list-item>
      </text:list>
      <text:p text:style-name="Text_20_body">Additionally:</text:p>
      <text:list xml:id="list279132699" text:style-name="L13">
        <text:list-item>
          <text:p text:style-name="P14">Side-wall repulsion prevents collision in narrow corridors</text:p>
        </text:list-item>
      </text:list>
      <text:p text:style-name="Horizontal_20_Line"/>
      <text:h text:style-name="Heading_20_3" text:outline-level="3"><text:span text:style-name="Strong_20_Emphasis">5.2 GVD Path Follower</text:span></text:h>
      <text:p text:style-name="Text_20_body">A simpler control strategy:</text:p>
      <text:list xml:id="list3968608796" text:style-name="L14">
        <text:list-item>
          <text:p text:style-name="P15">Rotate to align with waypoint</text:p>
        </text:list-item>
        <text:list-item>
          <text:p text:style-name="P15">Move forward</text:p>
        </text:list-item>
        <text:list-item>
          <text:p text:style-name="P15">Repeat</text:p>
        </text:list-item>
      </text:list>
      <text:h text:style-name="Heading_20_4" text:outline-level="4"><text:span text:style-name="Strong_20_Emphasis">Characteristics</text:span></text:h>
      <text:list xml:id="list3107192912" text:style-name="L15">
        <text:list-item>
          <text:p text:style-name="P16">Stable but less smooth</text:p>
        </text:list-item>
        <text:list-item>
          <text:p text:style-name="P16">Relies on planner for safety</text:p>
        </text:list-item>
      </text:list>
      <text:p text:style-name="Horizontal_20_Line"/>
      <text:h text:style-name="Heading_20_2" text:outline-level="2"><text:span text:style-name="Strong_20_Emphasis">6. Localization (Week 3)</text:span></text:h>
      <text:h text:style-name="Heading_20_3" text:outline-level="3"><text:span text:style-name="Strong_20_Emphasis">Objective</text:span></text:h>
      <text:p text:style-name="Text_20_body">To estimate robot pose on real hardware.</text:p>
      <text:h text:style-name="Heading_20_3" text:outline-level="3"><text:span text:style-name="Strong_20_Emphasis">Method</text:span></text:h>
      <text:list xml:id="list3127809462" text:style-name="L16">
        <text:list-item>
          <text:p text:style-name="P17">AMCL (Adaptive Monte Carlo Localization) was used</text:p>
        </text:list-item>
        <text:list-item>
          <text:p text:style-name="P17">Inputs:</text:p>
          <text:list>
            <text:list-item>
              <text:p text:style-name="P17">Laser scan</text:p>
            </text:list-item>
            <text:list-item>
              <text:p text:style-name="P17"><text:soft-page-break/>Map<draw:frame draw:style-name="fr3" draw:name="Image4" text:anchor-type="char" svg:x="3.8764in" svg:y="-0.398in" svg:width="2.6201in" svg:height="2.5327in" draw:z-index="3"><draw:image xlink:href="Pictures/100000010000032B000002C4AC217B6C73E732BA.png" xlink:type="simple" xlink:show="embed" xlink:actuate="onLoad" draw:mime-type="image/png"/></draw:frame></text:p>
            </text:list-item>
          </text:list>
        </text:list-item>
        <text:list-item>
          <text:p text:style-name="P17">Outputs:</text:p>
          <text:list>
            <text:list-item>
              <text:p text:style-name="P17">Pose estimate in map frame</text:p>
            </text:list-item>
          </text:list>
        </text:list-item>
      </text:list>
      <text:h text:style-name="Heading_20_3" text:outline-level="3"><text:span text:style-name="Strong_20_Emphasis">Important Steps</text:span></text:h>
      <text:list xml:id="list2262722922" text:style-name="L17">
        <text:list-item>
          <text:p text:style-name="P18">Lifecycle activation (configure → activate)</text:p>
        </text:list-item>
        <text:list-item>
          <text:p text:style-name="P18">Initial pose must be set manually</text:p>
        </text:list-item>
      </text:list>
      <text:p text:style-name="Text_20_body"/>
      <text:p text:style-name="Text_20_body"><text:tab/><text:tab/><text:tab/><text:tab/><text:tab/><text:tab/><text:tab/> <text:s text:c="9"/><text:span text:style-name="T4">Fig: 6.1 : Map in Rviz2 with Published path and localization as per current scan</text:span></text:p>
      <text:p text:style-name="Horizontal_20_Line"/>
      <text:h text:style-name="Heading_20_2" text:outline-level="2"><text:span text:style-name="Strong_20_Emphasis">7. Real Robot Deployment</text:span></text:h>
      <text:h text:style-name="Heading_20_3" text:outline-level="3"><text:span text:style-name="Strong_20_Emphasis">Setup</text:span></text:h>
      <text:list xml:id="list3783807572" text:style-name="L18">
        <text:list-item>
          <text:p text:style-name="P19">SSH connection to TurtleBot3</text:p>
        </text:list-item>
        <text:list-item>
          <text:p text:style-name="P19">ROS_DOMAIN_ID configured for communication</text:p>
        </text:list-item>
        <text:list-item>
          <text:p text:style-name="P19">Navigation stack launched on robot</text:p>
        </text:list-item>
      </text:list>
      <text:h text:style-name="Heading_20_3" text:outline-level="3"><text:span text:style-name="Strong_20_Emphasis">Execution Flow</text:span></text:h>
      <text:list xml:id="list317978986" text:style-name="L19">
        <text:list-item>
          <text:p text:style-name="P20">Start robot bringup</text:p>
        </text:list-item>
        <text:list-item>
          <text:p text:style-name="P20">Launch AMCL</text:p>
        </text:list-item>
        <text:list-item>
          <text:p text:style-name="P20">Load map</text:p>
        </text:list-item>
        <text:list-item>
          <text:p text:style-name="P20">Start planner</text:p>
        </text:list-item>
        <text:list-item>
          <text:p text:style-name="P20">Run path follower</text:p>
        </text:list-item>
      </text:list>
      <text:h text:style-name="Heading_20_3" text:outline-level="3"><text:span text:style-name="Strong_20_Emphasis">Challenges Faced</text:span></text:h>
      <text:list xml:id="list92519997" text:style-name="L20">
        <text:list-item>
          <text:p text:style-name="P21">QoS mismatches (sensor data loss)</text:p>
        </text:list-item>
        <text:list-item>
          <text:p text:style-name="P21">Frame transformations (map ↔ odom)</text:p>
        </text:list-item>
        <text:list-item>
          <text:p text:style-name="P21">Localization initialization</text:p>
        </text:list-item>
        <text:list-item>
          <text:p text:style-name="P21">Controller tuning for real-world noise</text:p>
        </text:list-item>
      </text:list>
      <text:p text:style-name="P36">A* based follower : <text:a xlink:type="simple" xlink:href="https://youtu.be/1sxk2Vhhj7A" text:style-name="Internet_20_link" text:visited-style-name="Visited_20_Internet_20_Link">https://youtu.be/1sxk2Vhhj7A</text:a><text:line-break/>GVD based follower : <text:a xlink:type="simple" xlink:href="https://youtu.be/z7i_HmjpiU4" text:style-name="Internet_20_link" text:visited-style-name="Visited_20_Internet_20_Link">https://youtu.be/z7i_HmjpiU4</text:a></text:p>
      <text:p text:style-name="Horizontal_20_Line"/>
      <text:h text:style-name="Heading_20_2" text:outline-level="2"><text:soft-page-break/><text:span text:style-name="Strong_20_Emphasis"/></text:h>
      <text:h text:style-name="Heading_20_2" text:outline-level="2"><text:span text:style-name="Strong_20_Emphasis">8. Trajectory Visualization</text:span></text:h>
      <text:p text:style-name="Text_20_body">A custom node was implemented to:</text:p>
      <text:list xml:id="list3527177639" text:style-name="L21">
        <text:list-item>
          <text:p text:style-name="P22">Subscribe to <text:span text:style-name="Source_20_Text">/odom</text:span><draw:frame draw:style-name="fr1" draw:name="Image6" text:anchor-type="char" svg:x="4.3102in" svg:y="0.0201in" svg:width="2.1563in" svg:height="2.3173in" draw:z-index="5"><draw:image xlink:href="Pictures/100000010000078000000438BB96212DB8355152.png" xlink:type="simple" xlink:show="embed" xlink:actuate="onLoad" draw:mime-type="image/png"/></draw:frame></text:p>
        </text:list-item>
        <text:list-item>
          <text:p text:style-name="P22">Publish actual path (<text:span text:style-name="Source_20_Text">/robot_trajectory</text:span>)<text:line-break/></text:p>
        </text:list-item>
      </text:list>
      <text:h text:style-name="Heading_20_3" text:outline-level="3"><text:span text:style-name="Strong_20_Emphasis">Purpose</text:span></text:h>
      <text:list xml:id="list4272985854" text:style-name="L22">
        <text:list-item>
          <text:p text:style-name="P23">Compare planned vs executed trajectory<text:line-break/><text:span text:style-name="T6">and improved the controller as error was visually <text:line-break/>more easy to to tune PID values </text:span></text:p>
        </text:list-item>
        <text:list-item>
          <text:p text:style-name="P23">Analyze tracking performance</text:p>
          <text:p text:style-name="P23"><draw:frame draw:style-name="fr2" draw:name="Image5" text:anchor-type="char" svg:x="0.8591in" svg:y="-0.0465in" svg:width="2.0244in" svg:height="2.2528in" draw:z-index="4"><draw:image xlink:href="Pictures/100000010000038B0000031EB11D5B644CBEF9CC.png" xlink:type="simple" xlink:show="embed" xlink:actuate="onLoad" draw:mime-type="image/png"/></draw:frame></text:p>
        </text:list-item>
      </text:list>
      <text:p text:style-name="Text_20_body"><text:tab/><text:tab/><text:tab/><text:tab/><text:tab/><text:span text:style-name="T7">Fig : 8.1 , path followed 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Heading_20_2" text:outline-level="2"><text:span text:style-name="Strong_20_Emphasis">9. Results and Observations</text:span></text:h>
      <text:h text:style-name="Heading_20_3" text:outline-level="3"><text:span text:style-name="Emphasis">A Planner</text:span>*</text:h>
      <text:list xml:id="list1688469514" text:style-name="L23">
        <text:list-item>
          <text:p text:style-name="P24">Shorter paths</text:p>
        </text:list-item>
        <text:list-item>
          <text:p text:style-name="P24">Faster computation</text:p>
        </text:list-item>
        <text:list-item>
          <text:p text:style-name="P24">Higher risk near obstacles</text:p>
        </text:list-item>
      </text:list>
      <text:h text:style-name="Heading_20_3" text:outline-level="3"><text:span text:style-name="Strong_20_Emphasis">GVD Planner</text:span></text:h>
      <text:list xml:id="list4050829373" text:style-name="L24">
        <text:list-item>
          <text:p text:style-name="P25">Safer paths with higher clearance</text:p>
        </text:list-item>
        <text:list-item>
          <text:p text:style-name="P25">Better suited for cluttered environments</text:p>
        </text:list-item>
      </text:list>
      <text:p text:style-name="Horizontal_20_Line"/>
      <text:h text:style-name="Heading_20_3" text:outline-level="3"><text:span text:style-name="Strong_20_Emphasis">Controller Performance</text:span></text:h>
      <text:list xml:id="list2384104909" text:style-name="L25">
        <text:list-item>
          <text:p text:style-name="P26">PID + lookahead provided smooth tracking</text:p>
        </text:list-item>
        <text:list-item>
          <text:p text:style-name="P26"><text:soft-page-break/>Reactive obstacle avoidance improved safety</text:p>
        </text:list-item>
        <text:list-item>
          <text:p text:style-name="P26">GVD follower was stable but less efficient</text:p>
        </text:list-item>
      </text:list>
      <text:p text:style-name="Horizontal_20_Line"/>
      <text:h text:style-name="Heading_20_3" text:outline-level="3"><text:span text:style-name="Strong_20_Emphasis">Simulation vs Real World</text:span></text:h>
      <text:list xml:id="list4261642531" text:style-name="L26">
        <text:list-item>
          <text:p text:style-name="P27">Real robot exhibited:</text:p>
          <text:list>
            <text:list-item>
              <text:p text:style-name="P27">Sensor noise</text:p>
            </text:list-item>
            <text:list-item>
              <text:p text:style-name="P27">Odometry drift, <text:span text:style-name="T8">Error in AMCL based estimation and Actual Position </text:span></text:p>
            </text:list-item>
            <text:list-item>
              <text:p text:style-name="P37">low frequency data updating and lags </text:p>
            </text:list-item>
          </text:list>
        </text:list-item>
        <text:list-item>
          <text:p text:style-name="P27">Required:</text:p>
          <text:list>
            <text:list-item>
              <text:p text:style-name="P27">Parameter tuning, <text:span text:style-name="T8">Tuning for gains and handling errors </text:span></text:p>
            </text:list-item>
            <text:list-item>
              <text:p text:style-name="P27">Robust control design </text:p>
            </text:list-item>
          </text:list>
        </text:list-item>
      </text:list>
      <text:p text:style-name="Horizontal_20_Line"/>
      <text:h text:style-name="Heading_20_2" text:outline-level="2"><text:span text:style-name="Strong_20_Emphasis">10. Limitations</text:span></text:h>
      <text:list xml:id="list506349713" text:style-name="L27">
        <text:list-item>
          <text:p text:style-name="P28">No dynamic obstacle handling<text:span text:style-name="T8">(only static implemented till now)</text:span></text:p>
        </text:list-item>
        <text:list-item>
          <text:p text:style-name="P28">Planner and controller are decoupled</text:p>
        </text:list-item>
        <text:list-item>
          <text:p text:style-name="P28">No uncertainty modeling</text:p>
        </text:list-item>
        <text:list-item>
          <text:p text:style-name="P28">Limited benchmarking</text:p>
        </text:list-item>
      </text:list>
      <text:p text:style-name="Horizontal_20_Line"/>
      <text:h text:style-name="Heading_20_2" text:outline-level="2"><text:span text:style-name="Strong_20_Emphasis">11. Future Work</text:span></text:h>
      <text:list xml:id="list1837258336" text:style-name="L28">
        <text:list-item>
          <text:p text:style-name="P29">Risk-aware planning under uncertainty</text:p>
        </text:list-item>
        <text:list-item>
          <text:p text:style-name="P29">Integration with reinforcement learning</text:p>
        </text:list-item>
        <text:list-item>
          <text:p text:style-name="P29">Dynamic obstacle avoidance (DWA / MPC)</text:p>
        </text:list-item>
        <text:list-item>
          <text:p text:style-name="P29">Controller-aware path planning</text:p>
        </text:list-item>
        <text:list-item>
          <text:p text:style-name="P29">Multi-robot coordination</text:p>
        </text:list-item>
      </text:list>
      <text:p text:style-name="Horizontal_20_Line"/>
      <text:h text:style-name="Heading_20_2" text:outline-level="2"><text:span text:style-name="Strong_20_Emphasis">12. Conclusion</text:span></text:h>
      <text:p text:style-name="Text_20_body">This project successfully demonstrates a full-stack autonomous navigation system integrating mapping, planning, and control in ROS2.</text:p>
      <text:p text:style-name="Text_20_body">The implementation highlights:</text:p>
      <text:list xml:id="list3173281113" text:style-name="L29">
        <text:list-item>
          <text:p text:style-name="P30">Trade-offs between optimality and safety (A* vs GVD)</text:p>
        </text:list-item>
        <text:list-item>
          <text:p text:style-name="P30"><text:soft-page-break/>Importance of control design in real-world deployment</text:p>
        </text:list-item>
        <text:list-item>
          <text:p text:style-name="P30">Challenges in sim-to-real transfer</text:p>
        </text:list-item>
      </text:list>
      <text:p text:style-name="Text_20_body">The system provides a strong foundation for further research in:</text:p>
      <text:list xml:id="list3993078132" text:style-name="L30">
        <text:list-item>
          <text:p text:style-name="P31">Robust navigation</text:p>
        </text:list-item>
        <text:list-item>
          <text:p text:style-name="P31">Learning-based control</text:p>
        </text:list-item>
        <text:list-item>
          <text:p text:style-name="P31">Autonomous systems design</text:p>
        </text:list-item>
      </text:list>
      <text:p text:style-name="Horizontal_20_Line"/>
      <text:h text:style-name="Heading_20_2" text:outline-level="2"><text:span text:style-name="Strong_20_Emphasis">13. Author</text:span></text:h>
      <text:p text:style-name="Text_20_body">Ayush Bhaskar<text:line-break/>IIT Bombay</text:p>
      <text:p text:style-name="P38">bhaskarayush2005@gmail.com</text:p>
      <text:p text:style-name="Horizontal_20_Line"/>
      <text:h text:style-name="Heading_20_2" text:outline-level="2"><text:span text:style-name="Strong_20_Emphasis">14. References</text:span></text:h>
      <text:list xml:id="list2665572414" text:style-name="L31">
        <text:list-item>
          <text:p text:style-name="P32">ROS2 Documentation</text:p>
        </text:list-item>
        <text:list-item>
          <text:p text:style-name="P32">TurtleBot3 e-Manual</text:p>
        </text:list-item>
        <text:list-item>
          <text:p text:style-name="P32">Probabilistic Robotics (Thrun et al.)</text:p>
        </text:list-item>
        <text:list-item>
          <text:p text:style-name="P32">A* Search Algorithm Literature</text:p>
        </text:list-item>
        <text:list-item>
          <text:p text:style-name="P32"><text:a xlink:type="simple" xlink:href="https://lavalle.pl/planning/" text:style-name="Internet_20_link" text:visited-style-name="Visited_20_Internet_20_Link">https://lavalle.pl/planning/</text:a></text:p>
        </text:list-item>
        <text:list-item>
          <text:p text:style-name="P32">Lectures on Robotic Planning and Kinematics by F. Bullo and S.L.Smith (<text:a xlink:type="simple" xlink:href="https://fbullo.github.io/lrpk/" text:style-name="Internet_20_link" text:visited-style-name="Visited_20_Internet_20_Link"><text:span text:style-name="T9">https://fbullo.github.io/lrpk/</text:span></text:a>)</text:p>
        </text:list-item>
        <text:list-item>
          <text:p text:style-name="P33"><text:span text:style-name="T8">Lecture Slides from SC 627: </text:span><text:span text:style-name="T10">Motion Planning &amp; Coordination of Autonomous Vehicles- </text:span><text:span text:style-name="T11">Prof. Arpita Sinha</text:span></text:p>
        </text:list-item>
      </text:list>
      <text:p text:style-name="P38"/>
      <text:p text:style-name="Horizontal_20_Line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8:33:43.204045391</meta:creation-date>
    <dc:date>2026-03-21T20:42:59.784061551</dc:date>
    <meta:editing-duration>PT1H28M36S</meta:editing-duration>
    <meta:editing-cycles>1</meta:editing-cycles>
    <meta:document-statistic meta:table-count="1" meta:image-count="6" meta:object-count="0" meta:page-count="8" meta:paragraph-count="192" meta:word-count="1007" meta:character-count="6373" meta:non-whitespace-character-count="5612"/>
    <meta:generator>LibreOffice/7.3.7.2$Linux_X86_64 LibreOffice_project/30$Build-2</meta:generator>
  </office:meta>
</office:document-meta>
</file>